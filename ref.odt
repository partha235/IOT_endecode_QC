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Heading_20_1">
      <style:paragraph-properties fo:margin-top="0in" fo:margin-bottom="0.0972in" style:contextual-spacing="false" fo:line-height="115%"/>
      <style:text-properties style:font-name="Nimbus Roman" fo:font-size="12pt" style:font-size-asian="12pt" style:font-size-complex="12pt"/>
    </style:style>
    <style:style style:name="P2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-0.3752in" style:auto-text-indent="false" style:page-number="auto" fo:background-color="transparent"/>
    </style:style>
    <style:style style:name="P3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-0.3752in" style:auto-text-indent="false" fo:background-color="transparent"/>
    </style:style>
    <style:style style:name="P4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-0.3752in" style:auto-text-indent="false" fo:background-color="transparent"/>
      <style:text-properties style:font-name="Nimbus Roman" fo:font-size="12pt" style:font-size-asian="12pt" style:font-size-complex="12pt"/>
    </style:style>
    <style:style style:name="T1" style:family="text">
      <style:text-properties style:font-name="Nimbus Roman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HAPTER 6</text:h>
      <text:h text:style-name="P1" text:outline-level="1">REFERENCES</text:h>
      <text:p text:style-name="P2"><text:span text:style-name="T1">[1] S.-L. Peng, S. Pal, and L. Huang, </text:span><text:span text:style-name="Emphasis"><text:span text:style-name="T1">Principles of Internet of Things (IoT) Ecosystem: Insight Paradigm</text:span></text:span><text:span text:style-name="T1">, Intelligent Systems Reference Library, vol. 174. Springer, 2020, doi: 10.1007/978-3-030-33596-0.</text:span></text:p>
      <text:p text:style-name="P3"><text:span text:style-name="T1">[2] A. K. Tamrakar, A. Shukla, A. H. Kalifullah, F. A. Reegu, and K. Shukla, “Extended review on Internet of Things (IoT) and its characterisation,” </text:span><text:span text:style-name="Emphasis"><text:span text:style-name="T1">International Journal of Health Sciences</text:span></text:span><text:span text:style-name="T1">, vol. 7, no. 26, pp. 8490–8500, 2022, doi: 10.53730/ijhs.v6ns2.7177.</text:span></text:p>
      <text:p text:style-name="P3"><text:span text:style-name="T1">[3] D. Belli, P. Barsocchi, and F. Palumbo, “Connectivity Standards Alliance Matter: State of the art and opportunities,” </text:span><text:span text:style-name="Emphasis"><text:span text:style-name="T1">Internet of Things</text:span></text:span><text:span text:style-name="T1">, vol. 25, Art. no. 101005, 2024, doi: 10.1016/j.iot.2023.101005.</text:span></text:p>
      <text:p text:style-name="P3"><text:span text:style-name="T1">[4] M. Soori, B. Arezoo, and R. Dastres, “Internet of Things for smart factories in Industry 4.0: A review,” </text:span><text:span text:style-name="Emphasis"><text:span text:style-name="T1">Internet of Things and Cyber-Physical Systems</text:span></text:span><text:span text:style-name="T1">, vol. 3, pp. 192–204, 2023, doi: 10.1016/j.iotcps.2023.04.006.</text:span></text:p>
      <text:p text:style-name="P3"><text:span text:style-name="T1">[5] S. Deep, X. Zheng, A. Jolfaei, D. Yu, P. Ostovari, and A. Kashif, “A survey of security and privacy issues in the Internet of Things from the layered context,” </text:span><text:span text:style-name="Emphasis"><text:span text:style-name="T1">Transactions on Emerging Telecommunications Technologies</text:span></text:span><text:span text:style-name="T1">, vol. 33, no. 6, p. e3935, 2022.</text:span></text:p>
      <text:p text:style-name="P3"><text:span text:style-name="T1">[6] M. I. Khalil and M. Abdel-Rahman, “Advanced cybersecurity measures in IT service operations and their crucial role in safeguarding enterprise data in a connected world,” </text:span><text:span text:style-name="Emphasis"><text:span text:style-name="T1">Eigen Review of Science and Technology</text:span></text:span><text:span text:style-name="T1">, vol. 7, no. 1, pp. 138–158, 2023.</text:span></text:p>
      <text:p text:style-name="P3"><text:span text:style-name="T1">[7] F. J. Jaime, A. Muñoz, F. Rodríguez-Gómez, and A. Jerez-Calero, “Strengthening privacy and data security in biomedical microelectromechanical systems by IoT communication security and protection in smart healthcare,” </text:span><text:span text:style-name="Emphasis"><text:span text:style-name="T1">Sensors</text:span></text:span><text:span text:style-name="T1">, vol. 23, no. 21, p. 8944, 2023, doi: 10.3390/s23218944.</text:span></text:p>
      <text:p text:style-name="P3"><text:span text:style-name="T1">[8] P. Brous, M. Janssen, and P. Herder, “The dual effects of the Internet of Things (IoT): A systematic review of the benefits and risks of IoT adoption by organizations,” </text:span><text:span text:style-name="Emphasis"><text:span text:style-name="T1">International Journal of Information Management</text:span></text:span><text:span text:style-name="T1">, vol. 51, Art. no. 101952, 2020, doi: 10.1016/j.ijinfomgt.2019.05.008.</text:span></text:p>
      <text:p text:style-name="P3"><text:span text:style-name="T1">[9] A. H. Farea and K. Küçük, “Detections of IoT attacks via machine learning-based approaches with Cooja,” </text:span><text:span text:style-name="Emphasis"><text:span text:style-name="T1">EAI Endorsed Transactions on Internet of Things</text:span></text:span><text:span text:style-name="T1">, vol. 7, no. 28, pp. 1–12, 2022, doi: 10.4108/eetiot.v7i28.324.</text:span></text:p>
      <text:p text:style-name="P3"><text:span text:style-name="T1">[10] M. Bagaa, T. Taleb, J. B. Bernabe, and A. Skarmeta, “A machine learning security framework for IoT systems,” </text:span><text:span text:style-name="Emphasis"><text:span text:style-name="T1">IEEE Access</text:span></text:span><text:span text:style-name="T1">, vol. 8, pp. 114066–114077, 2020, doi: 10.1109/ACCESS.2020.2996214.</text:span></text:p>
      <text:p text:style-name="P3"><text:span text:style-name="T1">[11] M. M. Nair and A. Kumar Tyagi, “Privacy: History, statistics, policy, laws, preservation and threat analysis,” </text:span><text:span text:style-name="Emphasis"><text:span text:style-name="T1">Journal of Information Assurance and Security</text:span></text:span><text:span text:style-name="T1">, vol. 16, pp. 24–34.</text:span></text:p>
      <text:p text:style-name="P3"><text:soft-page-break/><text:span text:style-name="T1">[12] M. Akil, L. Islami, S. Fischer-Hübner, L. A. Martucci, and A. Zuccato, “Privacy-preserving identifiers for IoT: A systematic literature review,” </text:span><text:span text:style-name="Emphasis"><text:span text:style-name="T1">IEEE Access</text:span></text:span><text:span text:style-name="T1">, vol. 8, pp. 168470–168485, 2020, doi: 10.1109/ACCESS.2020.3023659.</text:span></text:p>
      <text:p text:style-name="P3"><text:span text:style-name="T1">[13] J. Park and H. Lim, “Privacy-preserving federated learning using homomorphic encryption,” </text:span><text:span text:style-name="Emphasis"><text:span text:style-name="T1">Applied Sciences</text:span></text:span><text:span text:style-name="T1">, vol. 12, no. 2, p. 734, 2022, doi: 10.3390/app12020734.</text:span></text:p>
      <text:p text:style-name="P3"><text:span text:style-name="T1">[14] H. Fang and Q. Qian, “Privacy preserving machine learning with homomorphic encryption and federated learning,” </text:span><text:span text:style-name="Emphasis"><text:span text:style-name="T1">Future Internet</text:span></text:span><text:span text:style-name="T1">, vol. 13, no. 4, p. 94, 2021, doi: 10.3390/fi13040094.</text:span></text:p>
      <text:p text:style-name="P3"><text:span text:style-name="T1">[15] P. Sharma, “From data breach to data shield: The crucial role of big data analytics in modern cybersecurity strategies,” </text:span><text:span text:style-name="Emphasis"><text:span text:style-name="T1">International Journal of Information and Cybersecurity</text:span></text:span><text:span text:style-name="T1">, vol. 7, no. 9, pp. 31–59, 2023.</text:span></text:p>
      <text:p text:style-name="P3"><text:span text:style-name="T1">[16] Y. A. A. S. Aldeen, M. Salleh, and M. A. Razzaque, “A comprehensive review on privacy preserving data mining,” </text:span><text:span text:style-name="Emphasis"><text:span text:style-name="T1">SpringerPlus</text:span></text:span><text:span text:style-name="T1">, vol. 4, no. 1, pp. 1–36, 2015, doi: 10.1186/s40064-015-1481-x.</text:span></text:p>
      <text:p text:style-name="P3"><text:span text:style-name="T1">[17] P. Rodríguez, M. A. Bautista, J. Gonzalez, and S. Escalera, “Beyond one-hot encoding: Lower dimensional target embedding,” </text:span><text:span text:style-name="Emphasis"><text:span text:style-name="T1">Image and Vision Computing</text:span></text:span><text:span text:style-name="T1">, vol. 75, pp. 21–31, 2018, doi: 10.1016/j.imavis.2018.04.004.</text:span></text:p>
      <text:p text:style-name="P3"><text:span text:style-name="T1">[18] A. Seveso, A. Campagner, D. Ciucci, and F. Cabitza, “Ordinal labels in machine learning: A user-centered approach to improve data validity in medical settings,” </text:span><text:span text:style-name="Emphasis"><text:span text:style-name="T1">BMC Medical Informatics and Decision Making</text:span></text:span><text:span text:style-name="T1">, vol. 20, pp. 1–14, 2020, doi: 10.1186/s12911-020-01152-8.</text:span></text:p>
      <text:p text:style-name="P3"><text:span text:style-name="T1">[19] B. B. Jia and M. L. Zhang, “Multi-dimensional classification via sparse label encoding,” in </text:span><text:span text:style-name="Emphasis"><text:span text:style-name="T1">Proceedings of the International Conference on Machine Learning</text:span></text:span><text:span text:style-name="T1">, vol. 139, pp. 4917–4926, 2021.</text:span></text:p>
      <text:p text:style-name="P3"><text:span text:style-name="T1">[20] A. C. H. Choong and N. K. Lee, “Evaluation of convolutionary neural networks modeling of DNA sequences using ordinal versus one-hot encoding method,” in </text:span><text:span text:style-name="Emphasis"><text:span text:style-name="T1">International Conference on Computer and Drone Applications (IConDA)</text:span></text:span><text:span text:style-name="T1">, 2017, pp. 60–65, doi: 10.1109/ICONDA.2017.8270400.</text:span></text:p>
      <text:p text:style-name="P3"><text:span text:style-name="T1">[21] Rui Kang, Shaoxu Song, and Jianmin Wang, “Exploring SIMD Vectorization in Aggregation Pipelines for Encoded IoT Data,” in </text:span><text:span text:style-name="Emphasis"><text:span text:style-name="T1">2025 IEEE 41st International Conference on Data Engineering (ICDE)</text:span></text:span><text:span text:style-name="T1">, 2025, doi: 10.1109/ICDE65448.2025.00040.</text:span></text:p>
      <text:p text:style-name="P3"><text:span text:style-name="T1">[22] Zakia Zaman, Wanli Xue, Praveen Gauravaram, Wen Hu, and Sanjay Jha, “Privacy-Preserving Probabilistic Data Encoding for IoT Data Analysis,” </text:span><text:span text:style-name="Emphasis"><text:span text:style-name="T1">IEEE Internet of Things Journal</text:span></text:span><text:span text:style-name="T1">, 2023.</text:span></text:p>
      <text:p text:style-name="P3"><text:span text:style-name="T1">[23] Jakub Hyla, Wojciech Sułek, Weronika Izydorczyk, Leszek Dziczkowski, and Wojciech Filipowski, “Efficient LDPC Encoder Design for IoT-Type Devices,” </text:span><text:span text:style-name="Emphasis"><text:span text:style-name="T1">Applied Sciences</text:span></text:span><text:span text:style-name="T1">, vol. 12, no. 5, p. 2558, 2021, doi: 10.3390/app12052558.</text:span></text:p>
      <text:p text:style-name="P3"><text:soft-page-break/><text:span text:style-name="T1">[24] B. Gnaneshwari, “Enhancing Privacy, Security, and Performance in IoT Ecosystems Using AI-Powered Encoding Mechanisms,” </text:span><text:span text:style-name="Emphasis"><text:span text:style-name="T1">Journal of Emerging Technologies and Innovative Research (JETIR)</text:span></text:span><text:span text:style-name="T1">, vol. 12, no. 5, 2025.</text:span></text:p>
      <text:p text:style-name="P3"><text:span text:style-name="T1">[25] Insik Yoon, Ningyuan Cao, Anvesha Amaravati, and Arijit Raychowdhury, “A 55nm 50nJ/encode 13nJ/decode Homomorphic Encryption Crypto-Engine for IoT Nodes to Enable Secure Computation on Encrypted Data,” in </text:span><text:span text:style-name="Emphasis"><text:span text:style-name="T1">IEEE Conference Proceedings</text:span></text:span><text:span text:style-name="T1">, Georgia Institute of Technology.</text:span></text:p>
      <text:p text:style-name="P3"><text:span text:style-name="T1">[26] Aarthi Gopalakrishnan, Sharon Priya Surendran, and Aisha Banu Wahab, “Gated Dilated Causal Convolution-Based Encoder-Decoder Network for IoT Intrusion Detection,” </text:span><text:span text:style-name="Emphasis"><text:span text:style-name="T1">International Journal of Applied Power Engineering (IJAPE)</text:span></text:span><text:span text:style-name="T1">, vol. 14, no. 3, pp. 722–732, 2025.</text:span></text:p>
      <text:p text:style-name="P3"><text:span text:style-name="T1">[27] Narayana Rao Kumana, Budumuru Giri Teja, and Tangi Dileep Kumar, “Enhancing Data Security in IoT: An Integrated Approach with Cryptography and Steganography,” </text:span><text:span text:style-name="Emphasis"><text:span text:style-name="T1">JETIR</text:span></text:span><text:span text:style-name="T1">, vol. 11, no. 8, 2024.</text:span></text:p>
      <text:p text:style-name="P4">[28] Zhongguo Yang, Irshad Ahmed Abbasi, Fahad Algarni, Sikandar Ali, and Mingzhu Zhang, “An IoT Time Series Data Security Model for Adversarial Attack Based on Thermometer Encoding,” 2021.</text:p>
      <text:p text:style-name="P3"><text:span text:style-name="T1">[29] Manju Khari, Aditya Kumar Garg, Amir H. Gandomi, Rashmi Gupta, Rizwan Patan, and Balamurugan Balusamy, “Securing Data in Internet of Things (IoT) Using Cryptography and Steganography Techniques,” </text:span><text:span text:style-name="Emphasis"><text:span text:style-name="T1">IEEE Transactions on Systems, Man, and Cybernetics: Systems</text:span></text:span><text:span text:style-name="T1">.</text:span></text:p>
      <text:p text:style-name="P3"><text:span text:style-name="T1">[30] S. N. Swamy and S. R. Kota, “An Empirical Study on System Level Aspects of Internet of Things (IoT),” </text:span><text:span text:style-name="Emphasis"><text:span text:style-name="T1">IEEE Access</text:span></text:span><text:span text:style-name="T1">, vol. 8, pp. 188082–188134, 2020.</text:span></text:p>
      <text:p text:style-name="P3"><text:span text:style-name="T1">[31] V. A. Dubal and Y. S. Rao, “A Low-Power High-Performance Sensor Node for Internet of Things,” in </text:span><text:span text:style-name="Emphasis"><text:span text:style-name="T1">IEEE Second International Conference on Intelligent Computing and Control Systems (ICICCS)</text:span></text:span><text:span text:style-name="T1">, Madurai, India, 2018, pp. 607–612.</text:span></text:p>
      <text:p text:style-name="P3"><text:span text:style-name="T1">[32] C. Rajasekaran and K. Raguvaran, “Microcontroller Based Reconfigurable IoT Node,” in </text:span><text:span text:style-name="Emphasis"><text:span text:style-name="T1">IEEE 4th International Conference on Frontiers of Signal Processing</text:span></text:span><text:span text:style-name="T1">, France, 2018, pp. 12–16.</text:span></text:p>
      <text:p text:style-name="P3"><text:span text:style-name="T1">[33] Claude Berrou, A. Glavieux, and P. Thitimajshima, “Near Shannon Limit Error-Correcting Coding and Decoding: Turbo-Codes,” in </text:span><text:span text:style-name="Emphasis"><text:span text:style-name="T1">IEEE International Conference on Communications</text:span></text:span><text:span text:style-name="T1">, Geneva, Switzerland, 1993, pp. 1064–1070.</text:span></text:p>
      <text:p text:style-name="P3"><text:span text:style-name="T1">[34] Erdal Arikan, “Channel Polarization: A Method for Constructing Capacity-Achieving Codes for Symmetric Binary-Input Memoryless Channels,” </text:span><text:span text:style-name="Emphasis"><text:span text:style-name="T1">IEEE Transactions on Information Theory</text:span></text:span><text:span text:style-name="T1">, vol. 55, pp. 3051–3073, 2009.</text:span></text:p>
      <text:p text:style-name="P3"><text:span text:style-name="T1">[35] Robert Gallager, “Low-Density Parity-Check Codes,” </text:span><text:span text:style-name="Emphasis"><text:span text:style-name="T1">IRE Transactions on Information Theory</text:span></text:span><text:span text:style-name="T1">, vol. 8, pp. 21–28, 1962.</text:span></text:p>
      <text:p text:style-name="P3"><text:span text:style-name="T1">[36] David J. C. MacKay, “Good Error-Correcting Codes Based on Very Sparse Matrices,” </text:span><text:span text:style-name="Emphasis"><text:span text:style-name="T1">IEEE Transactions on Information Theory</text:span></text:span><text:span text:style-name="T1">, vol. 45, pp. 399–431, 1999.</text:span></text:p>
      <text:p text:style-name="P4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3T09:08:02.260199017</meta:creation-date>
    <dc:date>2026-05-13T10:50:38.712214476</dc:date>
    <meta:editing-duration>PT46M28S</meta:editing-duration>
    <meta:editing-cycles>4</meta:editing-cycles>
    <meta:generator>LibreOffice/26.2.3.2$Linux_X86_64 LibreOffice_project/620$Build-2</meta:generator>
    <meta:document-statistic meta:table-count="0" meta:image-count="0" meta:object-count="0" meta:page-count="4" meta:paragraph-count="38" meta:word-count="1133" meta:character-count="7813" meta:non-whitespace-character-count="6739"/>
  </office:meta>
</office:document-meta>
</file>