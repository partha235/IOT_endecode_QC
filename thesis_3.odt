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A00000158CF3C5D34.png" manifest:media-type="image/png"/>
  <manifest:file-entry manifest:full-path="Pictures/10000001000001230000010F80F02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text-properties style:font-name="Nimbus Roman" fo:font-size="12pt" officeooo:rsid="001cadfb" officeooo:paragraph-rsid="001cadfb" style:font-size-asian="12pt" style:font-size-complex="12pt"/>
    </style:style>
    <style:style style:name="P2" style:family="paragraph" style:parent-style-name="Heading_20_2">
      <style:paragraph-properties fo:margin-top="0in" fo:margin-bottom="0.0972in" style:contextual-spacing="false" fo:line-height="115%"/>
      <style:text-properties officeooo:rsid="001cadfb"/>
    </style:style>
    <style:style style:name="P3" style:family="paragraph" style:parent-style-name="Text_20_body">
      <style:text-properties style:font-name="Nimbus Roman" fo:font-size="12pt" officeooo:rsid="001cadfb" style:font-size-asian="12pt" style:font-size-complex="12pt"/>
    </style:style>
    <style:style style:name="P4" style:family="paragraph" style:parent-style-name="Text_20_body">
      <style:text-properties officeooo:rsid="001cadfb"/>
    </style:style>
    <style:style style:name="P5" style:family="paragraph" style:parent-style-name="Heading_20_2">
      <style:paragraph-properties fo:margin-top="0in" fo:margin-bottom="0.0972in" style:contextual-spacing="false" fo:line-height="115%"/>
    </style:style>
    <style:style style:name="P6" style:family="paragraph" style:parent-style-name="Text_20_body">
      <style:paragraph-properties fo:margin-top="0in" fo:margin-bottom="0.0972in" style:contextual-spacing="false" fo:line-height="115%"/>
    </style:style>
    <style:style style:name="P7" style:family="paragraph" style:parent-style-name="Text_20_body">
      <style:text-properties style:font-name="monospace" officeooo:rsid="001cadfb"/>
    </style:style>
    <style:style style:name="P8" style:family="paragraph" style:parent-style-name="Text_20_body" style:list-style-name="L1">
      <style:text-properties style:font-name="Nimbus Roman" fo:font-size="12pt" officeooo:rsid="001cadfb" style:font-size-asian="12pt" style:font-size-complex="12pt"/>
    </style:style>
    <style:style style:name="P9" style:family="paragraph" style:parent-style-name="Heading_20_1">
      <style:paragraph-properties fo:margin-top="0in" fo:margin-bottom="0.0972in" style:contextual-spacing="false" fo:line-height="115%"/>
      <style:text-properties style:font-name="monospace" officeooo:rsid="001cadfb"/>
    </style:style>
    <style:style style:name="P10" style:family="paragraph" style:parent-style-name="Heading_20_2">
      <style:paragraph-properties fo:margin-top="0in" fo:margin-bottom="0.0972in" style:contextual-spacing="false" fo:line-height="115%"/>
      <style:text-properties style:font-name="monospace" officeooo:rsid="001cadfb"/>
    </style:style>
    <style:style style:name="P11" style:family="paragraph" style:parent-style-name="Text_20_body" style:list-style-name="L2">
      <style:text-properties style:font-name="Nimbus Roman" fo:font-size="12pt" officeooo:rsid="001cadfb" style:font-size-asian="12pt" style:font-size-complex="12pt"/>
    </style:style>
    <style:style style:name="P12" style:family="paragraph" style:parent-style-name="Text_20_body" style:list-style-name="L3">
      <style:text-properties style:font-name="Nimbus Roman" fo:font-size="12pt" officeooo:rsid="001cadfb" style:font-size-asian="12pt" style:font-size-complex="12pt"/>
    </style:style>
    <style:style style:name="P13" style:family="paragraph" style:parent-style-name="Text_20_body" style:list-style-name="L4">
      <style:text-properties style:font-name="Nimbus Roman" fo:font-size="12pt" officeooo:rsid="001cadfb" style:font-size-asian="12pt" style:font-size-complex="12pt"/>
    </style:style>
    <style:style style:name="P14" style:family="paragraph" style:parent-style-name="Text_20_body" style:list-style-name="L5">
      <style:text-properties style:font-name="Nimbus Roman" fo:font-size="12pt" officeooo:rsid="001cadfb" style:font-size-asian="12pt" style:font-size-complex="12pt"/>
    </style:style>
    <style:style style:name="P15" style:family="paragraph" style:parent-style-name="Text_20_body" style:list-style-name="L6">
      <style:text-properties style:font-name="Nimbus Roman" fo:font-size="12pt" officeooo:rsid="001cadfb" style:font-size-asian="12pt" style:font-size-complex="12pt"/>
    </style:style>
    <style:style style:name="P16" style:family="paragraph" style:parent-style-name="Text_20_body" style:list-style-name="L7">
      <style:text-properties style:font-name="Nimbus Roman" fo:font-size="12pt" officeooo:rsid="001cadfb" style:font-size-asian="12pt" style:font-size-complex="12pt"/>
    </style:style>
    <style:style style:name="P17" style:family="paragraph" style:parent-style-name="Text_20_body" style:list-style-name="L8">
      <style:text-properties style:font-name="Nimbus Roman" fo:font-size="12pt" officeooo:rsid="001cadfb" style:font-size-asian="12pt" style:font-size-complex="12pt"/>
    </style:style>
    <style:style style:name="P18" style:family="paragraph" style:parent-style-name="Text_20_body" style:list-style-name="L9">
      <style:text-properties style:font-name="Nimbus Roman" fo:font-size="12pt" officeooo:rsid="001cadfb" style:font-size-asian="12pt" style:font-size-complex="12pt"/>
    </style:style>
    <style:style style:name="P19" style:family="paragraph" style:parent-style-name="Text_20_body" style:list-style-name="L10">
      <style:text-properties style:font-name="Nimbus Roman" fo:font-size="12pt" officeooo:rsid="001cadfb" style:font-size-asian="12pt" style:font-size-complex="12pt"/>
    </style:style>
    <style:style style:name="P20" style:family="paragraph" style:parent-style-name="Text_20_body" style:list-style-name="L11">
      <style:text-properties style:font-name="Nimbus Roman" fo:font-size="12pt" officeooo:rsid="001cadfb" style:font-size-asian="12pt" style:font-size-complex="12pt"/>
    </style:style>
    <style:style style:name="P21" style:family="paragraph" style:parent-style-name="Text_20_body" style:list-style-name="L12">
      <style:text-properties style:font-name="Nimbus Roman" fo:font-size="12pt" officeooo:rsid="001cadfb" style:font-size-asian="12pt" style:font-size-complex="12pt"/>
    </style:style>
    <style:style style:name="P22" style:family="paragraph" style:parent-style-name="Text_20_body" style:list-style-name="L13">
      <style:text-properties style:font-name="Nimbus Roman" fo:font-size="12pt" officeooo:rsid="001cadfb" style:font-size-asian="12pt" style:font-size-complex="12pt"/>
    </style:style>
    <style:style style:name="P23" style:family="paragraph" style:parent-style-name="Text_20_body" style:list-style-name="L14">
      <style:text-properties style:font-name="Nimbus Roman" fo:font-size="12pt" officeooo:rsid="001cadfb" style:font-size-asian="12pt" style:font-size-complex="12pt"/>
    </style:style>
    <style:style style:name="P24" style:family="paragraph" style:parent-style-name="Text_20_body" style:list-style-name="L15">
      <style:text-properties style:font-name="Nimbus Roman" fo:font-size="12pt" officeooo:rsid="001cadfb" style:font-size-asian="12pt" style:font-size-complex="12pt"/>
    </style:style>
    <style:style style:name="P25" style:family="paragraph" style:parent-style-name="Text_20_body" style:list-style-name="L16">
      <style:text-properties style:font-name="Nimbus Roman" fo:font-size="12pt" officeooo:rsid="001cadfb" style:font-size-asian="12pt" style:font-size-complex="12pt"/>
    </style:style>
    <style:style style:name="P26" style:family="paragraph" style:parent-style-name="Text_20_body" style:list-style-name="L17">
      <style:text-properties style:font-name="Nimbus Roman" fo:font-size="12pt" officeooo:rsid="001cadfb" style:font-size-asian="12pt" style:font-size-complex="12pt"/>
    </style:style>
    <style:style style:name="P27" style:family="paragraph" style:parent-style-name="Text_20_body" style:list-style-name="L18">
      <style:text-properties style:font-name="Nimbus Roman" fo:font-size="12pt" officeooo:rsid="001cadfb" style:font-size-asian="12pt" style:font-size-complex="12pt"/>
    </style:style>
    <style:style style:name="P28" style:family="paragraph" style:parent-style-name="Preformatted_20_Text">
      <style:paragraph-properties fo:margin-top="0in" fo:margin-bottom="0.0972in" style:contextual-spacing="false" fo:line-height="115%"/>
      <style:text-properties style:font-name="monospace" officeooo:rsid="001cadfb"/>
    </style:style>
    <style:style style:name="P29" style:family="paragraph" style:parent-style-name="Text_20_body" style:list-style-name="L19">
      <style:text-properties style:font-name="Nimbus Roman" fo:font-size="12pt" officeooo:rsid="001cadfb" style:font-size-asian="12pt" style:font-size-complex="12pt"/>
    </style:style>
    <style:style style:name="P30" style:family="paragraph" style:parent-style-name="Text_20_body" style:list-style-name="L20">
      <style:text-properties style:font-name="Nimbus Roman" fo:font-size="12pt" officeooo:rsid="001cadfb" style:font-size-asian="12pt" style:font-size-complex="12pt"/>
    </style:style>
    <style:style style:name="P31" style:family="paragraph" style:parent-style-name="Text_20_body" style:list-style-name="L21">
      <style:text-properties style:font-name="Nimbus Roman" fo:font-size="12pt" officeooo:rsid="001cadfb" style:font-size-asian="12pt" style:font-size-complex="12pt"/>
    </style:style>
    <style:style style:name="P32" style:family="paragraph" style:parent-style-name="Text_20_body" style:list-style-name="L22">
      <style:text-properties style:font-name="Nimbus Roman" fo:font-size="12pt" officeooo:rsid="001cadfb" style:font-size-asian="12pt" style:font-size-complex="12pt"/>
    </style:style>
    <style:style style:name="P33" style:family="paragraph" style:parent-style-name="Text_20_body" style:list-style-name="L23">
      <style:text-properties style:font-name="Nimbus Roman" fo:font-size="12pt" officeooo:rsid="001cadfb" style:font-size-asian="12pt" style:font-size-complex="12pt"/>
    </style:style>
    <style:style style:name="P34" style:family="paragraph" style:parent-style-name="Text_20_body" style:list-style-name="L24">
      <style:text-properties style:font-name="Nimbus Roman" fo:font-size="12pt" officeooo:rsid="001cadfb" style:font-size-asian="12pt" style:font-size-complex="12pt"/>
    </style:style>
    <style:style style:name="P35" style:family="paragraph" style:parent-style-name="Text_20_body" style:list-style-name="L25">
      <style:text-properties style:font-name="Nimbus Roman" fo:font-size="12pt" officeooo:rsid="001cadfb" style:font-size-asian="12pt" style:font-size-complex="12pt"/>
    </style:style>
    <style:style style:name="P36" style:family="paragraph" style:parent-style-name="Text_20_body" style:list-style-name="L26">
      <style:text-properties style:font-name="Nimbus Roman" fo:font-size="12pt" officeooo:rsid="001cadfb" style:font-size-asian="12pt" style:font-size-complex="12pt"/>
    </style:style>
    <style:style style:name="P37" style:family="paragraph" style:parent-style-name="Text_20_body" style:list-style-name="L27">
      <style:text-properties style:font-name="Nimbus Roman" fo:font-size="12pt" officeooo:rsid="001cadfb" style:font-size-asian="12pt" style:font-size-complex="12pt"/>
    </style:style>
    <style:style style:name="P38" style:family="paragraph" style:parent-style-name="Text_20_body" style:list-style-name="L28">
      <style:text-properties style:font-name="Nimbus Roman" fo:font-size="12pt" officeooo:rsid="001cadfb" style:font-size-asian="12pt" style:font-size-complex="12pt"/>
    </style:style>
    <style:style style:name="P39" style:family="paragraph" style:parent-style-name="Text_20_body" style:list-style-name="L29">
      <style:text-properties style:font-name="Nimbus Roman" fo:font-size="12pt" officeooo:rsid="001cadfb" style:font-size-asian="12pt" style:font-size-complex="12pt"/>
    </style:style>
    <style:style style:name="P40" style:family="paragraph" style:parent-style-name="Heading_20_3">
      <style:paragraph-properties fo:margin-top="0in" fo:margin-bottom="0.0972in" style:contextual-spacing="false" fo:line-height="115%"/>
      <style:text-properties style:font-name="monospace" officeooo:rsid="001cadfb"/>
    </style:style>
    <style:style style:name="P41" style:family="paragraph" style:parent-style-name="Text_20_body" style:list-style-name="L30">
      <style:text-properties style:font-name="Nimbus Roman" fo:font-size="12pt" officeooo:rsid="001cadfb" style:font-size-asian="12pt" style:font-size-complex="12pt"/>
    </style:style>
    <style:style style:name="P42" style:family="paragraph" style:parent-style-name="Text_20_body" style:list-style-name="L31">
      <style:text-properties style:font-name="Nimbus Roman" fo:font-size="12pt" officeooo:rsid="001cadfb" style:font-size-asian="12pt" style:font-size-complex="12pt"/>
    </style:style>
    <style:style style:name="P43" style:family="paragraph" style:parent-style-name="Text_20_body" style:list-style-name="L32">
      <style:text-properties style:font-name="Nimbus Roman" fo:font-size="12pt" officeooo:rsid="001cadfb" style:font-size-asian="12pt" style:font-size-complex="12pt"/>
    </style:style>
    <style:style style:name="P44" style:family="paragraph" style:parent-style-name="Text_20_body" style:list-style-name="L33">
      <style:text-properties style:font-name="Nimbus Roman" fo:font-size="12pt" officeooo:rsid="001cadfb" style:font-size-asian="12pt" style:font-size-complex="12pt"/>
    </style:style>
    <style:style style:name="P45" style:family="paragraph" style:parent-style-name="Text_20_body" style:list-style-name="L34">
      <style:text-properties style:font-name="Nimbus Roman" fo:font-size="12pt" officeooo:rsid="001cadfb" style:font-size-asian="12pt" style:font-size-complex="12pt"/>
    </style:style>
    <style:style style:name="P46" style:family="paragraph" style:parent-style-name="Text_20_body" style:list-style-name="L35">
      <style:text-properties style:font-name="Nimbus Roman" fo:font-size="12pt" officeooo:rsid="001cadfb" style:font-size-asian="12pt" style:font-size-complex="12pt"/>
    </style:style>
    <style:style style:name="P47" style:family="paragraph" style:parent-style-name="Text_20_body" style:list-style-name="L36">
      <style:text-properties style:font-name="Nimbus Roman" fo:font-size="12pt" officeooo:rsid="001cadfb" style:font-size-asian="12pt" style:font-size-complex="12pt"/>
    </style:style>
    <style:style style:name="P48" style:family="paragraph" style:parent-style-name="Text_20_body">
      <style:paragraph-properties fo:margin-top="0in" fo:margin-bottom="0.0972in" style:contextual-spacing="false" fo:line-height="115%"/>
      <style:text-properties style:font-name="monospace" officeooo:rsid="001cadfb"/>
    </style:style>
    <style:style style:name="P49" style:family="paragraph" style:parent-style-name="Heading_20_1">
      <style:paragraph-properties fo:margin-top="0in" fo:margin-bottom="0.0972in" style:contextual-spacing="false" fo:line-height="115%"/>
      <style:text-properties style:font-name="monospace" officeooo:rsid="001cadfb" officeooo:paragraph-rsid="00309b00"/>
    </style:style>
    <style:style style:name="P50" style:family="paragraph" style:parent-style-name="Text_20_body">
      <style:text-properties style:font-name="Nimbus Roman" fo:font-size="12pt" officeooo:rsid="001cadfb" officeooo:paragraph-rsid="00309b00" style:font-size-asian="12pt" style:font-size-complex="12pt"/>
    </style:style>
    <style:style style:name="T1" style:family="text">
      <style:text-properties style:font-name="Nimbus Roman" fo:font-size="12pt" style:font-size-asian="12pt" style:font-size-complex="12pt"/>
    </style:style>
    <style:style style:name="T2" style:family="text">
      <style:text-properties style:font-name="Nimbus Roman" fo:font-size="12pt" officeooo:rsid="001cadfb" style:font-size-asian="12pt" style:font-size-complex="12pt"/>
    </style:style>
    <style:style style:name="T3" style:family="text">
      <style:text-properties fo:font-variant="normal" fo:text-transform="none" style:use-window-font-color="true" loext:opacity="0%" style:font-name="Nimbus Roman" fo:font-size="12pt" fo:letter-spacing="normal" fo:font-style="normal" fo:font-weight="normal" officeooo:rsid="001cadfb" style:font-size-asian="12pt" style:font-size-complex="12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Methodology</text:p>
      <text:h text:style-name="P2" text:outline-level="2"><text:span text:style-name="Strong_20_Emphasis"><text:span text:style-name="T1"/></text:span></text:h>
      <text:h text:style-name="P2" text:outline-level="2"><text:span text:style-name="Strong_20_Emphasis"><text:span text:style-name="T1">BB84 Protocol </text:span></text:span></text:h>
      <text:p text:style-name="P3">The BB84 protocol is the first and most fundamental Quantum Key Distribution (QKD) scheme, proposed in 1984 by Charles H. Bennett and Gilles Brassard. It provides a secure method for two parties, traditionally referred to as Alice (sender) and Bob (receiver), to generate a shared secret key using the principles of quantum mechanics. Unlike classical key distribution techniques, the security of BB84 is not based on computational difficulty but on the fundamental laws of physics.</text:p>
      <text:p text:style-name="P4"><text:span text:style-name="T1">The protocol relies on the behavior of quantum bits, or qubits, which can exist in superposition states. In BB84, information is encoded in the polarization states of photons, using two different sets of bases: the </text:span><text:span text:style-name="Strong_20_Emphasis"><text:span text:style-name="T1">rectilinear basis (+)</text:span></text:span><text:span text:style-name="T1"> and the </text:span><text:span text:style-name="Strong_20_Emphasis"><text:span text:style-name="T1">diagonal basis (×)</text:span></text:span><text:span text:style-name="T1">. The rectilinear basis represents binary values using horizontal and vertical polarizations, while the diagonal basis uses 45° and 135° polarizations.</text:span></text:p>
      <text:p text:style-name="P3">The BB84 protocol begins with Alice generating two random sequences: a sequence of binary bits and a corresponding sequence of bases. Each bit is encoded into a quantum state based on the selected basis. For example, in the rectilinear basis, a bit value of 0 may be represented as a horizontal polarization state, while a bit value of 1 is represented as a vertical polarization state. In the diagonal basis, the same bits are represented using diagonal polarizations. This encoding ensures that the same bit value can have different physical representations depending on the basis used.</text:p>
      <text:p text:style-name="P3">Once the qubits are prepared, Alice transmits them to Bob through a quantum communication channel. Upon receiving each qubit, Bob independently and randomly selects a measurement basis (either rectilinear or diagonal) and performs a measurement. Due to the properties of quantum mechanics, if Bob chooses the same basis as Alice, he obtains the correct bit value. However, if he chooses a different basis, the measurement result becomes random, introducing uncertainty.</text:p>
      <text:p text:style-name="P4"><text:span text:style-name="T1">After the transmission is complete, Alice and Bob communicate over a classical public channel to compare the bases they used for each qubit. Importantly, they do not reveal the actual bit values, only the bases. They then discard all bits where their chosen bases do not match. The remaining bits, where both used the same basis, form what is known as the </text:span><text:span text:style-name="Strong_20_Emphasis"><text:span text:style-name="T1">sifted key</text:span></text:span><text:span text:style-name="T1">.</text:span></text:p>
      <text:p text:style-name="P3">To ensure the security of the communication, Alice and Bob perform an error-checking step. They randomly select a subset of the sifted key and compare their values. If the error rate is within an acceptable threshold, the communication is considered secure. However, if the error rate is significantly high, it indicates the possible presence of an eavesdropper, often referred to as Eve. In such cases, the key is discarded, and the process is repeated.</text:p>
      <text:p text:style-name="P3">The ability to detect eavesdropping is a unique and powerful feature of the BB84 protocol. According to quantum mechanics, any attempt by an eavesdropper to measure the transmitted qubits will disturb their states due to the observer effect. Since Eve does not know the correct basis for each qubit, her measurements introduce errors in the system, which can be detected during the error-checking phase.</text:p>
      <text:p text:style-name="P3"><text:soft-page-break/>After confirming the absence of eavesdropping, the remaining bits are further processed using classical techniques such as error correction and privacy amplification to produce the final secret key. This key can then be used for secure communication using symmetric encryption methods.</text:p>
      <text:p text:style-name="P4"><text:span text:style-name="T1">One of the major advantages of the BB84 protocol is that it provides </text:span><text:span text:style-name="Strong_20_Emphasis"><text:span text:style-name="T1">information-theoretic security</text:span></text:span><text:span text:style-name="T1">, meaning that its security is guaranteed by physical laws rather than computational assumptions. This makes it resistant to attacks from both classical and quantum computers. However, practical implementation of BB84 requires specialized hardware such as single-photon sources and detectors, and it may be affected by noise, signal loss, and distance limitations.</text:span></text:p>
      <text:h text:style-name="P2" text:outline-level="2"><text:span text:style-name="Strong_20_Emphasis"><text:span text:style-name="T1">Image-Based Data Extraction Using LSB Steganography</text:span></text:span></text:h>
      <text:p text:style-name="P4"><text:span text:style-name="T1">In addition to encrypted data transmission, the system incorporates a secondary mechanism for secure communication using </text:span><text:span text:style-name="Strong_20_Emphasis"><text:span text:style-name="T1">image-based steganography</text:span></text:span><text:span text:style-name="T1">. This method enables the embedding and extraction of hidden textual information within digital images, thereby enhancing security by concealing the existence of the data itself. Unlike traditional encryption, which protects the content of a message, steganography focuses on hiding the presence of the message.</text:span></text:p>
      <text:p text:style-name="P4"><text:span text:style-name="T1">The technique employed in this system is based on the </text:span><text:span text:style-name="Strong_20_Emphasis"><text:span text:style-name="T1">Least Significant Bit (LSB) substitution method</text:span></text:span><text:span text:style-name="T1">, one of the most widely used approaches in image steganography. In a digital image, each pixel is represented by bytes, and each byte consists of 8 bits. The least significant bit (LSB) contributes minimally to the overall visual representation of the image. Therefore, modifying this bit does not produce noticeable changes in image quality, making it suitable for embedding hidden data.</text:span></text:p>
      <text:p text:style-name="P3">In the embedding process, the secret message is first converted into its binary representation. Additionally, the length of the message is encoded into the first 16 bits to facilitate proper extraction at the receiver side. Each bit of the message is then embedded into the LSB of consecutive image bytes. Mathematically, this can be represented as modifying each byte such that its least significant bit matches the corresponding message bit. This process results in a modified image that visually appears identical to the original but contains hidden information.</text:p>
      <text:p text:style-name="P3">Once the embedding is completed, the image data is converted into a hexadecimal format and transmitted over a network using a socket connection. At the receiver side, the server reconstructs the image by converting the received hexadecimal data back into byte format and storing it as an image file. This ensures that the original structure of the image is preserved during transmission.</text:p>
      <text:p text:style-name="P3">The extraction process involves reading the image byte stream and retrieving the least significant bit from each byte. To ensure reliable decoding, an offset is used to skip the initial portion of the image data, which may contain headers or metadata that should not be altered. The extracted bits are then grouped to reconstruct the original message. The first 16 bits are interpreted as the length of the hidden message, and the subsequent bits are grouped into 8-bit segments to form characters, which are finally converted into readable text.</text:p>
      <text:p text:style-name="P3"><text:soft-page-break/>This method provides an additional layer of security by combining data hiding with communication. Even if the transmission is intercepted, the presence of hidden information is not easily detectable without knowledge of the embedding technique and extraction process. However, the approach has certain limitations, such as sensitivity to image compression and restricted data capacity.</text:p>
      <text:h text:style-name="P5" text:outline-level="2"><text:span text:style-name="Strong_20_Emphasis"><text:span text:style-name="T2">Block Diagram Description</text:span></text:span></text:h>
      <text:p text:style-name="P6"><draw:frame draw:style-name="fr1" draw:name="Image1" text:anchor-type="char" svg:width="3.0311in" svg:height="2.8228in" draw:z-index="0"><draw:image xlink:href="Pictures/10000001000001230000010F80F02CDF.png" xlink:type="simple" xlink:show="embed" xlink:actuate="onLoad" draw:mime-type="image/png"/></draw:frame><text:span text:style-name="Strong_20_Emphasis"><text:span text:style-name="T1"/></text:span></text:p>
      <text:p text:style-name="P3">The proposed system consists of multiple hardware components and a central processing unit that work together to perform secure data acquisition, transmission, and processing.</text:p>
      <text:p text:style-name="P7"><text:span text:style-name="T1">At the sensing level, the system uses environmental sensors such as the </text:span><text:span text:style-name="Strong_20_Emphasis"><text:span text:style-name="T1">DHT11</text:span></text:span><text:span text:style-name="T1"> and </text:span><text:span text:style-name="Strong_20_Emphasis"><text:span text:style-name="T1">BMP180</text:span></text:span><text:span text:style-name="T1">. The DHT11 sensor is responsible for measuring temperature and humidity, while the BMP180 sensor measures atmospheric pressure. These sensors are interfaced with the ESP32 microcontroller, which acts as the primary data acquisition unit.</text:span></text:p>
      <text:p text:style-name="P3">The ESP32 continuously reads data from the connected sensors and processes it. The collected sensor data is then converted into digital form and prepared for secure transmission. In addition to sensor data handling, the ESP32 also manages communication with the ESP32-CAM module when image-based transmission is required.</text:p>
      <text:p text:style-name="P3">The ESP32-CAM module is used for capturing images, which are further utilized for steganography-based data embedding. Hidden messages can be encoded within images and transmitted as an additional layer of secure communication.</text:p>
      <text:p text:style-name="P3">All processed data, including encrypted sensor values and encoded images, is transmitted over a wireless network to a central system (PC). The communication is established using Wi-Fi, with the ESP32 acting as the client and the PC acting as the server.</text:p>
      <text:p text:style-name="P3">The PC serves as the main processing and monitoring unit. It performs multiple functions, including:</text:p>
      <text:list text:style-name="L1">
        <text:list-item>
          <text:p text:style-name="P8"><text:soft-page-break/>Receiving encrypted sensor data</text:p>
        </text:list-item>
        <text:list-item>
          <text:p text:style-name="P8">Decrypting the data using the shared key</text:p>
        </text:list-item>
        <text:list-item>
          <text:p text:style-name="P8">Extracting hidden messages from received images</text:p>
        </text:list-item>
        <text:list-item>
          <text:p text:style-name="P8">Displaying real-time data through a web-based dashboard</text:p>
        </text:list-item>
      </text:list>
      <text:h text:style-name="P5" text:outline-level="2"><text:span text:style-name="Strong_20_Emphasis"><text:span text:style-name="T3"/></text:span></text:h>
      <text:h text:style-name="P5" text:outline-level="2"><text:span text:style-name="Strong_20_Emphasis"><text:span text:style-name="T2">System Workflow Description</text:span></text:span></text:h>
      <text:p text:style-name="P6"><draw:frame draw:style-name="fr2" draw:name="Image2" text:anchor-type="char" svg:width="5.7709in" svg:height="3.5835in" draw:z-index="1"><draw:image xlink:href="Pictures/100000010000022A00000158CF3C5D34.png" xlink:type="simple" xlink:show="embed" xlink:actuate="onLoad" draw:mime-type="image/png"/></draw:frame><text:span text:style-name="Strong_20_Emphasis"><text:span text:style-name="T1"/></text:span></text:p>
      <text:p text:style-name="P3">The proposed system follows a structured workflow that integrates IoT sensing, encryption, and steganography to ensure secure data transmission. The workflow begins at the sensing and data acquisition stage and progresses through multiple security layers before reaching the final processing unit.</text:p>
      <text:p text:style-name="P3">Initially, environmental data is collected using sensors connected to the ESP32 microcontroller. The DHT11 sensor measures temperature and humidity, while the BMP180 sensor captures atmospheric pressure. The ESP32 processes these sensor readings and converts them into a digital format suitable for further operations.</text:p>
      <text:p text:style-name="P3">Once the data is acquired, it undergoes preprocessing, where values are scaled and converted into binary form. This binary data is then encrypted using a lightweight XOR-based encryption mechanism. The encryption key is generated using a Quantum Key Distribution (QKD)-inspired approach, ensuring secure and dynamic key generation.</text:p>
      <text:p text:style-name="P3"><text:soft-page-break/>Parallel to the sensor data processing, the ESP32-CAM module is used for image handling. In this stage, additional data (such as text messages) is embedded into an image using the Least Significant Bit (LSB) steganography technique. This allows hidden information to be transmitted covertly within image data, adding an extra layer of security.</text:p>
      <text:p text:style-name="P3">After encryption and/or steganographic embedding, the data is transmitted over a wireless network using Wi-Fi. The ESP32 acts as the transmitting node, sending either encrypted sensor data or encoded image data to the receiver system.</text:p>
      <text:p text:style-name="P3">At the receiver side, which is a PC-based server, the incoming data is processed based on its type. Encrypted sensor data is decrypted using the same XOR operation and the shared key to recover the original values. These values are then converted back into human-readable form and displayed on a web-based dashboard for real-time monitoring.</text:p>
      <text:p text:style-name="P3">For image-based transmission, the server reconstructs the image from the received data and applies an extraction algorithm to retrieve the hidden message. The Least Significant Bits of the image bytes are analyzed to recover the embedded information accurately.</text:p>
      <text:h text:style-name="P9" text:outline-level="1"><text:span text:style-name="Strong_20_Emphasis"><text:span text:style-name="T1">3.X Software Description</text:span></text:span></text:h>
      <text:p text:style-name="P3">The proposed system integrates multiple software tools and programming environments to implement data acquisition, encryption, quantum key generation, steganography, and visualization. Each software component plays a specific role in ensuring the functionality and security of the system.</text:p>
      <text:h text:style-name="P10" text:outline-level="2"><text:span text:style-name="Strong_20_Emphasis"><text:span text:style-name="T1">3.X.1 MicroPython (ESP32 Programming)</text:span></text:span></text:h>
      <text:p text:style-name="P3">MicroPython is a lightweight implementation of the Python programming language designed for microcontrollers. In this system, MicroPython is used to program the ESP32 module.</text:p>
      <text:p text:style-name="P3">The ESP32 uses MicroPython to:</text:p>
      <text:list text:style-name="L2">
        <text:list-item>
          <text:p text:style-name="P11">Interface with sensors such as DHT11 and BMP180</text:p>
        </text:list-item>
        <text:list-item>
          <text:p text:style-name="P11">Collect real-time environmental data</text:p>
        </text:list-item>
        <text:list-item>
          <text:p text:style-name="P11">Perform data preprocessing and scaling</text:p>
        </text:list-item>
        <text:list-item>
          <text:p text:style-name="P11">Convert sensor values into binary format</text:p>
        </text:list-item>
        <text:list-item>
          <text:p text:style-name="P11">Apply XOR-based encryption using the shared key</text:p>
        </text:list-item>
        <text:list-item>
          <text:p text:style-name="P11">Establish Wi-Fi communication and send data to the server</text:p>
        </text:list-item>
      </text:list>
      <text:p text:style-name="P3">MicroPython is chosen due to its simplicity, low memory usage, and suitability for resource-constrained IoT devices.</text:p>
      <text:h text:style-name="P10" text:outline-level="2"><text:span text:style-name="Strong_20_Emphasis"><text:span text:style-name="T1">3.X.2 Python (Server-Side Processing)</text:span></text:span></text:h>
      <text:p text:style-name="P3">Python is used on the server (PC) side for handling communication, data processing, and visualization.</text:p>
      <text:p text:style-name="P3"><text:soft-page-break/>Its functionalities include:</text:p>
      <text:list text:style-name="L3">
        <text:list-item>
          <text:p text:style-name="P12">Creating a TCP socket server for receiving data</text:p>
        </text:list-item>
        <text:list-item>
          <text:p text:style-name="P12">Decrypting incoming encrypted data</text:p>
        </text:list-item>
        <text:list-item>
          <text:p text:style-name="P12">Reconstructing sensor values from binary format</text:p>
        </text:list-item>
        <text:list-item>
          <text:p text:style-name="P12">Handling image data transmission and decoding</text:p>
        </text:list-item>
        <text:list-item>
          <text:p text:style-name="P12">Running a web server for real-time monitoring</text:p>
        </text:list-item>
      </text:list>
      <text:p text:style-name="P3">Python provides flexibility and ease of integration with various libraries, making it ideal for rapid development.</text:p>
      <text:h text:style-name="P10" text:outline-level="2"><text:span text:style-name="Strong_20_Emphasis"><text:span text:style-name="T1">3.X.3 Quantum Simulation (QKD Implementation)</text:span></text:span></text:h>
      <text:p text:style-name="P3">A quantum simulation environment is used to implement a BB84-inspired Quantum Key Distribution mechanism.</text:p>
      <text:p text:style-name="P3">Key operations include:</text:p>
      <text:list text:style-name="L4">
        <text:list-item>
          <text:p text:style-name="P13">Random bit generation</text:p>
        </text:list-item>
        <text:list-item>
          <text:p text:style-name="P13">Random basis selection</text:p>
        </text:list-item>
        <text:list-item>
          <text:p text:style-name="P13">Quantum circuit creation</text:p>
        </text:list-item>
        <text:list-item>
          <text:p text:style-name="P13">Measurement simulation</text:p>
        </text:list-item>
        <text:list-item>
          <text:p text:style-name="P13">Shared key generation</text:p>
        </text:list-item>
      </text:list>
      <text:p text:style-name="P3">This simulation enables secure key generation without requiring physical quantum hardware, making it practical for experimental implementation.</text:p>
      <text:h text:style-name="P10" text:outline-level="2"><text:span text:style-name="Strong_20_Emphasis"><text:span text:style-name="T1">3.X.4 Socket Programming</text:span></text:span></text:h>
      <text:p text:style-name="P3">Socket programming is used to establish communication between the ESP32 and the server.</text:p>
      <text:p text:style-name="P3">Features:</text:p>
      <text:list text:style-name="L5">
        <text:list-item>
          <text:p text:style-name="P14">TCP-based reliable communication</text:p>
        </text:list-item>
        <text:list-item>
          <text:p text:style-name="P14">Client-server architecture</text:p>
        </text:list-item>
        <text:list-item>
          <text:p text:style-name="P14">Data transmission in binary/string format</text:p>
        </text:list-item>
      </text:list>
      <text:p text:style-name="P3">The ESP32 acts as a client, while the server continuously listens for incoming data.</text:p>
      <text:h text:style-name="P10" text:outline-level="2"><text:span text:style-name="Strong_20_Emphasis"><text:span text:style-name="T1">3.X.5 Web Server and Dashboard</text:span></text:span></text:h>
      <text:p text:style-name="P3">A lightweight HTTP server is implemented on the PC to visualize data.</text:p>
      <text:p text:style-name="P3"><text:soft-page-break/>Functions:</text:p>
      <text:list text:style-name="L6">
        <text:list-item>
          <text:p text:style-name="P15">Displays temperature, humidity, and pressure</text:p>
        </text:list-item>
        <text:list-item>
          <text:p text:style-name="P15">Provides real-time updates using auto-refresh</text:p>
        </text:list-item>
        <text:list-item>
          <text:p text:style-name="P15">Uses HTML and CSS for user interface design</text:p>
        </text:list-item>
      </text:list>
      <text:p text:style-name="P3">This enables users to monitor sensor data through a web browser.</text:p>
      <text:h text:style-name="P10" text:outline-level="2"><text:span text:style-name="Strong_20_Emphasis"><text:span text:style-name="T1">3.X.6 Image Processing and Steganography</text:span></text:span></text:h>
      <text:p text:style-name="P3">Python is used for handling image-based communication and steganography.</text:p>
      <text:p text:style-name="P3">Operations include:</text:p>
      <text:list text:style-name="L7">
        <text:list-item>
          <text:p text:style-name="P16">Receiving image data in hexadecimal format</text:p>
        </text:list-item>
        <text:list-item>
          <text:p text:style-name="P16">Converting hex data into image bytes</text:p>
        </text:list-item>
        <text:list-item>
          <text:p text:style-name="P16">Saving reconstructed images</text:p>
        </text:list-item>
        <text:list-item>
          <text:p text:style-name="P16">Extracting hidden messages using LSB technique</text:p>
        </text:list-item>
      </text:list>
      <text:p text:style-name="P3">The Least Significant Bit method is used to retrieve embedded data from the image without affecting its visual quality.</text:p>
      <text:h text:style-name="P10" text:outline-level="2"><text:span text:style-name="Strong_20_Emphasis"><text:span text:style-name="T1">3.X.7 Data Encoding and Decoding</text:span></text:span></text:h>
      <text:p text:style-name="P3">Custom algorithms are implemented for:</text:p>
      <text:list text:style-name="L8">
        <text:list-item>
          <text:p text:style-name="P17">Converting integers to binary bit streams</text:p>
        </text:list-item>
        <text:list-item>
          <text:p text:style-name="P17">Concatenating multiple sensor values</text:p>
        </text:list-item>
        <text:list-item>
          <text:p text:style-name="P17">Encrypting and decrypting data using XOR</text:p>
        </text:list-item>
        <text:list-item>
          <text:p text:style-name="P17">Reconstructing original sensor values</text:p>
        </text:list-item>
      </text:list>
      <text:p text:style-name="P3">These operations ensure efficient and structured data handling throughout the system.</text:p>
      <text:h text:style-name="P10" text:outline-level="2"><text:span text:style-name="Strong_20_Emphasis"><text:span text:style-name="T1">3.X.8 Development Environment</text:span></text:span></text:h>
      <text:p text:style-name="P3">The system is developed using standard tools such as:</text:p>
      <text:list text:style-name="L9">
        <text:list-item>
          <text:p text:style-name="P18">Code editors for writing MicroPython and Python scripts</text:p>
        </text:list-item>
        <text:list-item>
          <text:p text:style-name="P18">Serial monitor for debugging ESP32</text:p>
        </text:list-item>
        <text:list-item>
          <text:p text:style-name="P18">Local server environment for testing</text:p>
        </text:list-item>
      </text:list>
      <text:p text:style-name="P3">These tools support efficient coding, debugging, and testing of the system.</text:p>
      <text:p text:style-name="P3"/>
      <text:h text:style-name="P9" text:outline-level="1"><text:soft-page-break/><text:span text:style-name="Strong_20_Emphasis"><text:span text:style-name="T1">3.X Hardware Description</text:span></text:span></text:h>
      <text:p text:style-name="P3">The proposed system integrates multiple hardware components to perform environmental data acquisition, image processing, and wireless communication. The hardware setup is designed to be cost-effective, efficient, and suitable for real-time IoT applications.</text:p>
      <text:h text:style-name="P10" text:outline-level="2"><text:span text:style-name="Strong_20_Emphasis"><text:span text:style-name="T1">3.X.1 ESP32 Microcontroller</text:span></text:span></text:h>
      <text:p text:style-name="P3">The ESP32 is the core processing unit of the system. It is a low-cost, low-power microcontroller with built-in Wi-Fi and Bluetooth capabilities, making it ideal for IoT applications.</text:p>
      <text:p text:style-name="P3">In this system, the ESP32 performs the following functions:</text:p>
      <text:list text:style-name="L10">
        <text:list-item>
          <text:p text:style-name="P19">Interfacing with sensors (DHT11 and BMP180)</text:p>
        </text:list-item>
        <text:list-item>
          <text:p text:style-name="P19">Collecting real-time environmental data</text:p>
        </text:list-item>
        <text:list-item>
          <text:p text:style-name="P19">Processing and scaling sensor values</text:p>
        </text:list-item>
        <text:list-item>
          <text:p text:style-name="P19">Converting data into binary format</text:p>
        </text:list-item>
        <text:list-item>
          <text:p text:style-name="P19">Performing XOR-based encryption</text:p>
        </text:list-item>
        <text:list-item>
          <text:p text:style-name="P19">Establishing Wi-Fi communication with the server</text:p>
        </text:list-item>
      </text:list>
      <text:p text:style-name="P3">The ESP32 is selected due to its high performance, integrated networking features, and compatibility with MicroPython.</text:p>
      <text:h text:style-name="P10" text:outline-level="2"><text:span text:style-name="Strong_20_Emphasis"><text:span text:style-name="T1">3.X.2 DHT11 Sensor</text:span></text:span></text:h>
      <text:p text:style-name="P3">The DHT11 is a digital sensor used to measure temperature and humidity.</text:p>
      <text:p text:style-name="P3">Features:</text:p>
      <text:list text:style-name="L11">
        <text:list-item>
          <text:p text:style-name="P20">Temperature range: 0°C to 50°C</text:p>
        </text:list-item>
        <text:list-item>
          <text:p text:style-name="P20">Humidity range: 20% to 90%</text:p>
        </text:list-item>
        <text:list-item>
          <text:p text:style-name="P20">Digital output signal</text:p>
        </text:list-item>
        <text:list-item>
          <text:p text:style-name="P20">Low power consumption</text:p>
        </text:list-item>
      </text:list>
      <text:p text:style-name="P3">In this system, the DHT11 provides environmental data that is used for monitoring and secure transmission.</text:p>
      <text:h text:style-name="P10" text:outline-level="2"><text:span text:style-name="Strong_20_Emphasis"><text:span text:style-name="T1">3.X.3 BMP180 Pressure Sensor</text:span></text:span></text:h>
      <text:p text:style-name="P3">The BMP180 is a barometric pressure sensor used to measure atmospheric pressure.</text:p>
      <text:p text:style-name="P3">Features:</text:p>
      <text:list text:style-name="L12">
        <text:list-item>
          <text:p text:style-name="P21">High accuracy pressure measurement</text:p>
        </text:list-item>
        <text:list-item>
          <text:p text:style-name="P21"><text:soft-page-break/>I2C communication interface</text:p>
        </text:list-item>
        <text:list-item>
          <text:p text:style-name="P21">Low power consumption</text:p>
        </text:list-item>
      </text:list>
      <text:p text:style-name="P3">The sensor communicates with the ESP32 via the I2C protocol and provides pressure data for analysis and transmission.</text:p>
      <text:h text:style-name="P10" text:outline-level="2"><text:span text:style-name="Strong_20_Emphasis"><text:span text:style-name="T1">3.X.4 ESP32-CAM Module</text:span></text:span></text:h>
      <text:p text:style-name="P3">The ESP32-CAM is a compact module that combines an ESP32 microcontroller with a camera.</text:p>
      <text:p text:style-name="P3">Functions in the system:</text:p>
      <text:list text:style-name="L13">
        <text:list-item>
          <text:p text:style-name="P22">Captures images</text:p>
        </text:list-item>
        <text:list-item>
          <text:p text:style-name="P22">Supports image-based data transmission</text:p>
        </text:list-item>
        <text:list-item>
          <text:p text:style-name="P22">Enables steganography by embedding hidden messages</text:p>
        </text:list-item>
      </text:list>
      <text:p text:style-name="P3">This module plays a key role in implementing the image-based communication subsystem.</text:p>
      <text:h text:style-name="P10" text:outline-level="2"><text:span text:style-name="Strong_20_Emphasis"><text:span text:style-name="T1">3.X.5 Power Supply</text:span></text:span></text:h>
      <text:p text:style-name="P3">The system requires a stable power source for proper operation.</text:p>
      <text:list text:style-name="L14">
        <text:list-item>
          <text:p text:style-name="P23">ESP32 operates at 3.3V</text:p>
        </text:list-item>
        <text:list-item>
          <text:p text:style-name="P23">Sensors are powered through the ESP32</text:p>
        </text:list-item>
        <text:list-item>
          <text:p text:style-name="P23">USB or regulated power supply is used</text:p>
        </text:list-item>
      </text:list>
      <text:p text:style-name="P3">Proper voltage regulation is essential to ensure reliable performance and prevent hardware damage.</text:p>
      <text:h text:style-name="P10" text:outline-level="2"><text:span text:style-name="Strong_20_Emphasis"><text:span text:style-name="T1">3.X.6 Communication Interface</text:span></text:span></text:h>
      <text:p text:style-name="P3">The system uses built-in Wi-Fi capabilities of the ESP32 for communication.</text:p>
      <text:list text:style-name="L15">
        <text:list-item>
          <text:p text:style-name="P24">Protocol: TCP/IP</text:p>
        </text:list-item>
        <text:list-item>
          <text:p text:style-name="P24">Mode: Client (ESP32) → Server (PC)</text:p>
        </text:list-item>
        <text:list-item>
          <text:p text:style-name="P24">Wireless transmission of encrypted data and images</text:p>
        </text:list-item>
      </text:list>
      <text:p text:style-name="P3">This eliminates the need for additional communication modules.</text:p>
      <text:h text:style-name="P10" text:outline-level="2"><text:span text:style-name="Strong_20_Emphasis"><text:span text:style-name="T1">3.X.7 Interfacing and Connections</text:span></text:span></text:h>
      <text:p text:style-name="P3">The hardware components are connected as follows:</text:p>
      <text:list text:style-name="L16">
        <text:list-item>
          <text:p text:style-name="P25">DHT11 → Digital GPIO pin of ESP32</text:p>
        </text:list-item>
        <text:list-item>
          <text:p text:style-name="P25">BMP180 → I2C interface (SDA, SCL)</text:p>
        </text:list-item>
        <text:list-item>
          <text:p text:style-name="P25">ESP32-CAM → Operates as separate module</text:p>
        </text:list-item>
        <text:list-item>
          <text:p text:style-name="P25"><text:soft-page-break/>Power supply → Common ground shared across components</text:p>
        </text:list-item>
      </text:list>
      <text:p text:style-name="P3">Proper wiring ensures accurate data acquisition and stable operation.</text:p>
      <text:h text:style-name="P10" text:outline-level="2"><text:span text:style-name="Strong_20_Emphasis"><text:span text:style-name="T1">3.X.8 System Integration</text:span></text:span></text:h>
      <text:p text:style-name="P3">All hardware components work together as a unified system:</text:p>
      <text:list text:style-name="L17">
        <text:list-item>
          <text:p text:style-name="P26">Sensors collect environmental data</text:p>
        </text:list-item>
        <text:list-item>
          <text:p text:style-name="P26">ESP32 processes and encrypts data</text:p>
        </text:list-item>
        <text:list-item>
          <text:p text:style-name="P26">ESP32-CAM handles image capture and steganography</text:p>
        </text:list-item>
        <text:list-item>
          <text:p text:style-name="P26">Data is transmitted wirelessly to the PC</text:p>
        </text:list-item>
        <text:list-item>
          <text:p text:style-name="P26">PC processes and displays results</text:p>
        </text:list-item>
      </text:list>
      <text:p text:style-name="P3">This integration enables secure and efficient IoT communication.</text:p>
      <text:h text:style-name="P10" text:outline-level="2"><text:span text:style-name="Strong_20_Emphasis"><text:span text:style-name="T1">3.X.9 Advantages of Hardware Design</text:span></text:span></text:h>
      <text:list text:style-name="L18">
        <text:list-item>
          <text:p text:style-name="P27">Low-cost implementation</text:p>
        </text:list-item>
        <text:list-item>
          <text:p text:style-name="P27">Wireless communication capability</text:p>
        </text:list-item>
        <text:list-item>
          <text:p text:style-name="P27">Modular and scalable design</text:p>
        </text:list-item>
        <text:list-item>
          <text:p text:style-name="P27">Suitable for real-time monitoring</text:p>
        </text:list-item>
        <text:list-item>
          <text:p text:style-name="P27">Supports both data encryption and steganography</text:p>
        </text:list-item>
      </text:list>
      <text:h text:style-name="P10" text:outline-level="2"><text:span text:style-name="Strong_20_Emphasis"><text:span text:style-name="T1">3.X.10 Summary</text:span></text:span></text:h>
      <text:p text:style-name="P3">The hardware architecture of the system is designed to support secure data acquisition and transmission using efficient and widely available components. The integration of sensors, microcontrollers, and communication modules ensures reliable operation while maintaining flexibility for future enhancements.</text:p>
      <text:h text:style-name="P9" text:outline-level="1"><text:span text:style-name="Strong_20_Emphasis"><text:span text:style-name="T1">3.X Code Explanation</text:span></text:span></text:h>
      <text:p text:style-name="P3">This section explains the implementation of the proposed system, including sensor data acquisition, encryption, communication, quantum key generation, and steganographic decoding. The code is divided into transmitter-side (ESP32) and receiver-side (server) operations.</text:p>
      <text:h text:style-name="P10" text:outline-level="2"><text:span text:style-name="Strong_20_Emphasis"><text:span text:style-name="T1">3.X.1 Sensor Initialization (ESP32)</text:span></text:span></text:h>
      <text:p text:style-name="P3">The ESP32 initializes sensors using GPIO and I2C interfaces.</text:p>
      <text:p text:style-name="P28"><text:span text:style-name="Source_20_Text"><text:span text:style-name="T1">sensor = dht.DHT11(Pin(4))</text:span></text:span></text:p>
      <text:p text:style-name="P28"><text:span text:style-name="Source_20_Text"><text:span text:style-name="T1">i2c = I2C(scl=Pin(22), sda=Pin(21), freq=100000)</text:span></text:span></text:p>
      <text:p text:style-name="P28"><text:soft-page-break/><text:span text:style-name="Source_20_Text"><text:span text:style-name="T1">bmp180 = BMP180(i2c)</text:span></text:span></text:p>
      <text:list text:style-name="L19">
        <text:list-item>
          <text:p text:style-name="P29">DHT11 is connected to a digital pin</text:p>
        </text:list-item>
        <text:list-item>
          <text:p text:style-name="P29">BMP180 uses I2C communication</text:p>
        </text:list-item>
        <text:list-item>
          <text:p text:style-name="P29">These sensors provide temperature, humidity, and pressure</text:p>
        </text:list-item>
      </text:list>
      <text:h text:style-name="P10" text:outline-level="2"><text:span text:style-name="Strong_20_Emphasis"><text:span text:style-name="T1">3.X.2 Reading Sensor Data</text:span></text:span></text:h>
      <text:p text:style-name="P28"><text:span text:style-name="Source_20_Text"><text:span text:style-name="T1">sensor.measure()</text:span></text:span></text:p>
      <text:p text:style-name="P28"><text:span text:style-name="Source_20_Text"><text:span text:style-name="T1">temp_scaled <text:s/>= int(sensor.temperature() * 10 + 0.5)</text:span></text:span></text:p>
      <text:p text:style-name="P28"><text:span text:style-name="Source_20_Text"><text:span text:style-name="T1">hum_scaled <text:s text:c="2"/>= int(sensor.humidity() * 10 + 0.5)</text:span></text:span></text:p>
      <text:p text:style-name="P28"><text:span text:style-name="Source_20_Text"><text:span text:style-name="T1">press_scaled = int((bmp180.pressure / 100) * 10)</text:span></text:span></text:p>
      <text:list text:style-name="L20">
        <text:list-item>
          <text:p text:style-name="P30">Sensor values are read periodically</text:p>
        </text:list-item>
        <text:list-item>
          <text:p text:style-name="P30">Values are scaled (×10) to preserve decimal precision</text:p>
        </text:list-item>
        <text:list-item>
          <text:p text:style-name="P30">Converted into integers for binary processing</text:p>
        </text:list-item>
      </text:list>
      <text:h text:style-name="P10" text:outline-level="2"><text:span text:style-name="Strong_20_Emphasis"><text:span text:style-name="T1">3.X.3 Integer to Binary Conversion</text:span></text:span></text:h>
      <text:p text:style-name="P28"><text:span text:style-name="Source_20_Text"><text:span text:style-name="T1">def int_to_bits(value, bits=16):</text:span></text:span></text:p>
      <text:p text:style-name="P28"><text:span text:style-name="Source_20_Text"><text:span text:style-name="T1"><text:s text:c="4"/>out = []</text:span></text:span></text:p>
      <text:p text:style-name="P28"><text:span text:style-name="Source_20_Text"><text:span text:style-name="T1"><text:s text:c="4"/>for i in range(bits):</text:span></text:span></text:p>
      <text:p text:style-name="P28"><text:span text:style-name="Source_20_Text"><text:span text:style-name="T1"><text:s text:c="8"/>out.append((value &gt;&gt; (bits - 1 - i)) &amp; 1)</text:span></text:span></text:p>
      <text:p text:style-name="P28"><text:span text:style-name="Source_20_Text"><text:span text:style-name="T1"><text:s text:c="4"/>return out</text:span></text:span></text:p>
      <text:list text:style-name="L21">
        <text:list-item>
          <text:p text:style-name="P31">Converts integer values into fixed-length (16-bit) binary</text:p>
        </text:list-item>
        <text:list-item>
          <text:p text:style-name="P31">Ensures uniform data size for encryption</text:p>
        </text:list-item>
      </text:list>
      <text:h text:style-name="P10" text:outline-level="2"><text:span text:style-name="Strong_20_Emphasis"><text:span text:style-name="T1">3.X.4 Data Formation</text:span></text:span></text:h>
      <text:p text:style-name="P28"><text:span text:style-name="Source_20_Text"><text:span text:style-name="T1">data_bits = temp_bits + hum_bits + press_bits</text:span></text:span></text:p>
      <text:list text:style-name="L22">
        <text:list-item>
          <text:p text:style-name="P32">Combines all sensor data into a single bitstream</text:p>
        </text:list-item>
        <text:list-item>
          <text:p text:style-name="P32">Total length = 48 bits</text:p>
        </text:list-item>
      </text:list>
      <text:h text:style-name="P10" text:outline-level="2"><text:span text:style-name="Strong_20_Emphasis"><text:span text:style-name="T1">3.X.5 XOR Encryption</text:span></text:span></text:h>
      <text:p text:style-name="P28"><text:span text:style-name="Source_20_Text"><text:span text:style-name="T1">def xor_encrypt(data_bits, key, pos):</text:span></text:span></text:p>
      <text:p text:style-name="P28"><text:span text:style-name="Source_20_Text"><text:span text:style-name="T1"><text:s text:c="4"/>out = []</text:span></text:span></text:p>
      <text:p text:style-name="P28"><text:span text:style-name="Source_20_Text"><text:span text:style-name="T1"><text:s text:c="4"/>for b in data_bits:</text:span></text:span></text:p>
      <text:p text:style-name="P28"><text:soft-page-break/><text:span text:style-name="Source_20_Text"><text:span text:style-name="T1"><text:s text:c="8"/>out.append(b ^ key[pos % len(key)])</text:span></text:span></text:p>
      <text:p text:style-name="P28"><text:span text:style-name="Source_20_Text"><text:span text:style-name="T1"><text:s text:c="8"/>pos += 1</text:span></text:span></text:p>
      <text:p text:style-name="P28"><text:span text:style-name="Source_20_Text"><text:span text:style-name="T1"><text:s text:c="4"/>return out, pos</text:span></text:span></text:p>
      <text:list text:style-name="L23">
        <text:list-item>
          <text:p text:style-name="P33">Each bit is XORed with key bits</text:p>
        </text:list-item>
        <text:list-item>
          <text:p text:style-name="P33">Key is reused cyclically</text:p>
        </text:list-item>
        <text:list-item>
          <text:p text:style-name="P33">Produces encrypted bitstream</text:p>
        </text:list-item>
      </text:list>
      <text:h text:style-name="P10" text:outline-level="2"><text:span text:style-name="Strong_20_Emphasis"><text:span text:style-name="T1">3.X.6 Wi-Fi Connection</text:span></text:span></text:h>
      <text:p text:style-name="P28"><text:span text:style-name="Source_20_Text"><text:span text:style-name="T1">wifi = network.WLAN(network.STA_IF)</text:span></text:span></text:p>
      <text:p text:style-name="P28"><text:span text:style-name="Source_20_Text"><text:span text:style-name="T1">wifi.active(True)</text:span></text:span></text:p>
      <text:p text:style-name="P28"><text:span text:style-name="Source_20_Text"><text:span text:style-name="T1">wifi.connect(SSID, PASSWORD)</text:span></text:span></text:p>
      <text:list text:style-name="L24">
        <text:list-item>
          <text:p text:style-name="P34">ESP32 connects to wireless network</text:p>
        </text:list-item>
        <text:list-item>
          <text:p text:style-name="P34">Enables communication with server</text:p>
        </text:list-item>
      </text:list>
      <text:h text:style-name="P10" text:outline-level="2"><text:span text:style-name="Strong_20_Emphasis"><text:span text:style-name="T1">3.X.7 Data Transmission</text:span></text:span></text:h>
      <text:p text:style-name="P28"><text:span text:style-name="Source_20_Text"><text:span text:style-name="T1">s = socket.socket(socket.AF_INET, socket.SOCK_STREAM)</text:span></text:span></text:p>
      <text:p text:style-name="P28"><text:span text:style-name="Source_20_Text"><text:span text:style-name="T1">s.connect((SERVER_IP, PORT))</text:span></text:span></text:p>
      <text:p text:style-name="P28"><text:span text:style-name="Source_20_Text"><text:span text:style-name="T1">s.send(send_data.encode())</text:span></text:span></text:p>
      <text:p text:style-name="P28"><text:span text:style-name="Source_20_Text"><text:span text:style-name="T1">s.close()</text:span></text:span></text:p>
      <text:list text:style-name="L25">
        <text:list-item>
          <text:p text:style-name="P35">TCP socket is used</text:p>
        </text:list-item>
        <text:list-item>
          <text:p text:style-name="P35">Encrypted data is sent as string</text:p>
        </text:list-item>
        <text:list-item>
          <text:p text:style-name="P35">Connection is closed after transmission</text:p>
        </text:list-item>
      </text:list>
      <text:h text:style-name="P10" text:outline-level="2"><text:span text:style-name="Strong_20_Emphasis"><text:span text:style-name="T1">3.X.8 QKD Key Generation (Server)</text:span></text:span></text:h>
      <text:p text:style-name="P28"><text:span text:style-name="Source_20_Text"><text:span text:style-name="T1">key_gen = qkd_generation(16)</text:span></text:span></text:p>
      <text:p text:style-name="P28"><text:span text:style-name="Source_20_Text"><text:span text:style-name="T1">key = key_gen.circuit_create()</text:span></text:span></text:p>
      <text:list text:style-name="L26">
        <text:list-item>
          <text:p text:style-name="P36">Generates shared key using BB84 simulation</text:p>
        </text:list-item>
        <text:list-item>
          <text:p text:style-name="P36">Key used for both encryption and decryption</text:p>
        </text:list-item>
      </text:list>
      <text:h text:style-name="P10" text:outline-level="2"><text:span text:style-name="Strong_20_Emphasis"><text:span text:style-name="T1">3.X.9 XOR Decryption</text:span></text:span></text:h>
      <text:p text:style-name="P28"><text:span text:style-name="Source_20_Text"><text:span text:style-name="T1">def xor_decrypt(data_bits, key, pos):</text:span></text:span></text:p>
      <text:p text:style-name="P28"><text:span text:style-name="Source_20_Text"><text:span text:style-name="T1"><text:s text:c="4"/>out = []</text:span></text:span></text:p>
      <text:p text:style-name="P28"><text:soft-page-break/><text:span text:style-name="Source_20_Text"><text:span text:style-name="T1"><text:s text:c="4"/>for b in data_bits:</text:span></text:span></text:p>
      <text:p text:style-name="P28"><text:span text:style-name="Source_20_Text"><text:span text:style-name="T1"><text:s text:c="8"/>out.append(b ^ key[pos % len(key)])</text:span></text:span></text:p>
      <text:p text:style-name="P28"><text:span text:style-name="Source_20_Text"><text:span text:style-name="T1"><text:s text:c="8"/>pos += 1</text:span></text:span></text:p>
      <text:p text:style-name="P28"><text:span text:style-name="Source_20_Text"><text:span text:style-name="T1"><text:s text:c="4"/>return out, pos</text:span></text:span></text:p>
      <text:list text:style-name="L27">
        <text:list-item>
          <text:p text:style-name="P37">Same as encryption (XOR is reversible)</text:p>
        </text:list-item>
        <text:list-item>
          <text:p text:style-name="P37">Recovers original data</text:p>
        </text:list-item>
      </text:list>
      <text:h text:style-name="P10" text:outline-level="2"><text:span text:style-name="Strong_20_Emphasis"><text:span text:style-name="T1">3.X.10 Data Reconstruction</text:span></text:span></text:h>
      <text:p text:style-name="P28"><text:span text:style-name="Source_20_Text"><text:span text:style-name="T1">temp_val <text:s/>= int(temp_bits, 2)</text:span></text:span></text:p>
      <text:p text:style-name="P28"><text:span text:style-name="Source_20_Text"><text:span text:style-name="T1">temp = temp_val / 10</text:span></text:span></text:p>
      <text:list text:style-name="L28">
        <text:list-item>
          <text:p text:style-name="P38">Binary converted back to integer</text:p>
        </text:list-item>
        <text:list-item>
          <text:p text:style-name="P38">Scaled back to real values</text:p>
        </text:list-item>
      </text:list>
      <text:h text:style-name="P10" text:outline-level="2"><text:span text:style-name="Strong_20_Emphasis"><text:span text:style-name="T1">3.X.11 Web Server Dashboard</text:span></text:span></text:h>
      <text:p text:style-name="P28"><text:span text:style-name="Source_20_Text"><text:span text:style-name="T1">httpd = HTTPServer(("0.0.0.0", 8080), WebHandler)</text:span></text:span></text:p>
      <text:p text:style-name="P28"><text:span text:style-name="Source_20_Text"><text:span text:style-name="T1">httpd.serve_forever()</text:span></text:span></text:p>
      <text:list text:style-name="L29">
        <text:list-item>
          <text:p text:style-name="P39">Displays real-time data</text:p>
        </text:list-item>
        <text:list-item>
          <text:p text:style-name="P39">Auto-refresh web interface</text:p>
        </text:list-item>
        <text:list-item>
          <text:p text:style-name="P39">Shows temperature, humidity, pressure</text:p>
        </text:list-item>
      </text:list>
      <text:h text:style-name="P10" text:outline-level="2"><text:span text:style-name="Strong_20_Emphasis"><text:span text:style-name="T1">3.X.12 Steganography – Data Extraction</text:span></text:span></text:h>
      <text:h text:style-name="P40" text:outline-level="3"><text:span text:style-name="Strong_20_Emphasis"><text:span text:style-name="T1">LSB Extraction</text:span></text:span></text:h>
      <text:p text:style-name="P28"><text:span text:style-name="Source_20_Text"><text:span text:style-name="T1">bits.append(b &amp; 1)</text:span></text:span></text:p>
      <text:list text:style-name="L30">
        <text:list-item>
          <text:p text:style-name="P41">Extracts least significant bit from each byte</text:p>
        </text:list-item>
      </text:list>
      <text:h text:style-name="P40" text:outline-level="3"><text:span text:style-name="Strong_20_Emphasis"><text:span text:style-name="T1">Message Length Extraction</text:span></text:span></text:h>
      <text:p text:style-name="P28"><text:span text:style-name="Source_20_Text"><text:span text:style-name="T1">msg_len = (msg_len &lt;&lt; 1) | bits[i]</text:span></text:span></text:p>
      <text:list text:style-name="L31">
        <text:list-item>
          <text:p text:style-name="P42">First 16 bits represent message length</text:p>
        </text:list-item>
      </text:list>
      <text:h text:style-name="P40" text:outline-level="3"><text:span text:style-name="Strong_20_Emphasis"><text:span text:style-name="T1">Message Reconstruction</text:span></text:span></text:h>
      <text:p text:style-name="P28"><text:span text:style-name="Source_20_Text"><text:span text:style-name="T1">byte = (byte &lt;&lt; 1) | bits[index]</text:span></text:span></text:p>
      <text:list text:style-name="L32">
        <text:list-item>
          <text:p text:style-name="P43">Groups bits into bytes</text:p>
        </text:list-item>
        <text:list-item>
          <text:p text:style-name="P43">Converts to characters</text:p>
        </text:list-item>
      </text:list>
      <text:h text:style-name="P40" text:outline-level="3"><text:soft-page-break/><text:span text:style-name="Strong_20_Emphasis"><text:span text:style-name="T1">Final Decoding</text:span></text:span></text:h>
      <text:p text:style-name="P28"><text:span text:style-name="Source_20_Text"><text:span text:style-name="T1">bytes(message_bytes).decode()</text:span></text:span></text:p>
      <text:list text:style-name="L33">
        <text:list-item>
          <text:p text:style-name="P44">Converts byte array into readable text</text:p>
        </text:list-item>
      </text:list>
      <text:h text:style-name="P10" text:outline-level="2"><text:span text:style-name="Strong_20_Emphasis"><text:span text:style-name="T1">3.X.13 Image Reconstruction</text:span></text:span></text:h>
      <text:p text:style-name="P28"><text:span text:style-name="Source_20_Text"><text:span text:style-name="T1">img_bytes = bytes.fromhex(hex_string)</text:span></text:span></text:p>
      <text:p text:style-name="P28"><text:span text:style-name="Source_20_Text"><text:span text:style-name="T1">with open(filename, "wb") as f:</text:span></text:span></text:p>
      <text:p text:style-name="P28"><text:span text:style-name="Source_20_Text"><text:span text:style-name="T1"><text:s text:c="4"/>f.write(img_bytes)</text:span></text:span></text:p>
      <text:list text:style-name="L34">
        <text:list-item>
          <text:p text:style-name="P45">Converts received hex into image</text:p>
        </text:list-item>
        <text:list-item>
          <text:p text:style-name="P45">Saves file for processing</text:p>
        </text:list-item>
      </text:list>
      <text:h text:style-name="P10" text:outline-level="2"><text:span text:style-name="Strong_20_Emphasis"><text:span text:style-name="T1">3.X.14 Overall Flow in Code</text:span></text:span></text:h>
      <text:h text:style-name="P40" text:outline-level="3"><text:span text:style-name="Strong_20_Emphasis"><text:span text:style-name="T1">Transmitter</text:span></text:span></text:h>
      <text:list text:style-name="L35">
        <text:list-item>
          <text:p text:style-name="P46">Read sensor data</text:p>
        </text:list-item>
        <text:list-item>
          <text:p text:style-name="P46">Convert to binary</text:p>
        </text:list-item>
        <text:list-item>
          <text:p text:style-name="P46">Encrypt using XOR</text:p>
        </text:list-item>
        <text:list-item>
          <text:p text:style-name="P46">Send via Wi-Fi</text:p>
        </text:list-item>
      </text:list>
      <text:h text:style-name="P40" text:outline-level="3"><text:span text:style-name="Strong_20_Emphasis"><text:span text:style-name="T1">Receiver</text:span></text:span></text:h>
      <text:list text:style-name="L36">
        <text:list-item>
          <text:p text:style-name="P47">Generate key</text:p>
        </text:list-item>
        <text:list-item>
          <text:p text:style-name="P47">Receive data</text:p>
        </text:list-item>
        <text:list-item>
          <text:p text:style-name="P47">Decrypt</text:p>
        </text:list-item>
        <text:list-item>
          <text:p text:style-name="P47">Display data</text:p>
        </text:list-item>
        <text:list-item>
          <text:p text:style-name="P47">Extract hidden message (if image)</text:p>
        </text:list-item>
      </text:list>
      <text:h text:style-name="P10" text:outline-level="2"><text:span text:style-name="Strong_20_Emphasis"><text:span text:style-name="T1"/></text:span></text:h>
      <text:p text:style-name="P48"><text:span text:style-name="Strong_20_Emphasis"><text:span text:style-name="T1"/></text:span></text:p>
      <text:p text:style-name="P48"><text:span text:style-name="Strong_20_Emphasis"><text:span text:style-name="T1"/></text:span></text:p>
      <text:p text:style-name="P48"><text:span text:style-name="Strong_20_Emphasis"><text:span text:style-name="T1"/></text:span></text:p>
      <text:p text:style-name="P48"><text:span text:style-name="Strong_20_Emphasis"><text:span text:style-name="T1"/></text:span></text:p>
      <text:p text:style-name="P48"><text:span text:style-name="Strong_20_Emphasis"><text:span text:style-name="T1"/></text:span></text:p>
      <text:h text:style-name="P9" text:outline-level="1"><text:soft-page-break/><text:span text:style-name="Strong_20_Emphasis"><text:span text:style-name="T1">4: RESULTS</text:span></text:span></text:h>
      <text:p text:style-name="P3">The proposed system was successfully implemented and tested to evaluate its performance in secure data transmission using IoT, encryption, and steganography techniques. The system integrates environmental sensing, XOR-based encryption with quantum-inspired key generation, and image-based data hiding, demonstrating a multi-layered security approach.</text:p>
      <text:p text:style-name="P3">During experimentation, the ESP32 module continuously collected environmental data from the DHT11 and BMP180 sensors. The measured parameters included temperature, humidity, and atmospheric pressure. The collected values were scaled and converted into binary format before being encrypted using a key generated through a simulated Quantum Key Distribution (QKD) mechanism. The encrypted data was then transmitted over a Wi-Fi network to the server system.</text:p>
      <text:p text:style-name="P3">At the receiver side, the server successfully received the encrypted data through a TCP socket connection. The decryption process, based on the XOR operation with the shared key, accurately reconstructed the original sensor values. The recovered values matched the transmitted data with minimal error, confirming the correctness and reliability of the encryption and decryption process.</text:p>
      <text:p text:style-name="P3">The real-time web dashboard displayed the decrypted sensor values effectively. The interface updated periodically, showing temperature, humidity, and pressure readings in a clear and user-friendly format. This demonstrates the system’s capability for real-time monitoring and visualization.</text:p>
      <text:p text:style-name="P3">In addition to sensor data transmission, the image-based steganography subsystem was also tested. Images transmitted from the ESP32 were successfully reconstructed at the server. The Least Significant Bit (LSB) extraction algorithm accurately retrieved the hidden message embedded within the image. The decoded messages were consistent with the original input, validating the effectiveness of the steganographic method.</text:p>
      <text:p text:style-name="P3">The system showed stable performance under normal network conditions. Data transmission was reliable, with no significant packet loss observed during testing. The encryption process introduced negligible computational overhead, making it suitable for resource-constrained IoT devices like the ESP32.</text:p>
      <text:p text:style-name="P3">However, certain limitations were observed. The use of a simulated QKD system means that true quantum-level security is not physically implemented. Additionally, the XOR-based encryption, while lightweight, depends on the quality and reuse of the key. The steganography method is sensitive to image modifications such as compression, which may affect message recovery.</text:p>
      <text:p text:style-name="P3">Overall, the results demonstrate that the proposed system effectively achieves secure data transmission by combining encryption and steganography. The integration of IoT devices with quantum-inspired security mechanisms provides a promising approach for enhancing data protection in modern communication systems.</text:p>
      <text:p text:style-name="P48"><text:span text:style-name="Strong_20_Emphasis"><text:span text:style-name="T1"/></text:span></text:p>
      <text:h text:style-name="P49" text:outline-level="1"><text:soft-page-break/><text:span text:style-name="Strong_20_Emphasis"><text:span text:style-name="T1">5: CONCLUSION </text:span></text:span></text:h>
      <text:p text:style-name="P50">This project presented the design and implementation of a secure IoT-based data transmission system that integrates environmental sensing, encryption, quantum-inspired key generation, and steganography techniques. The primary objective was to enhance the security of IoT communication by combining lightweight encryption methods with advanced key distribution concepts and covert data transmission.</text:p>
      <text:p text:style-name="P3">The system successfully demonstrated real-time acquisition of environmental data using sensors such as DHT11 and BMP180, interfaced with the ESP32 microcontroller. The collected data was processed, converted into binary format, and encrypted using an XOR-based method. A key feature of the system is the use of a Quantum Key Distribution (QKD)-inspired mechanism for generating encryption keys, which adds an additional layer of security compared to conventional static key methods.</text:p>
      <text:p text:style-name="P3">The encrypted data was transmitted over a wireless network and successfully received by a server system. The decryption process accurately reconstructed the original sensor values, confirming the reliability of the encryption and communication modules. Furthermore, the implementation of a web-based dashboard enabled real-time visualization of the sensor data, demonstrating the system’s effectiveness in monitoring applications.</text:p>
      <text:p text:style-name="P3">In addition to encryption, the project incorporated an image-based steganography subsystem using the Least Significant Bit (LSB) technique. This allowed hidden messages to be embedded within images and transmitted covertly. The receiver system successfully extracted the hidden data, validating the effectiveness of the steganographic approach. The combination of encryption and steganography provided a dual-layer security mechanism, significantly improving the confidentiality of transmitted dat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6T14:19:19.639383951</meta:creation-date>
    <meta:generator>LibreOffice/26.2.0.3$Linux_X86_64 LibreOffice_project/620$Build-3</meta:generator>
    <dc:date>2026-04-30T11:15:54.984007865</dc:date>
    <meta:editing-duration>PT55M33S</meta:editing-duration>
    <meta:editing-cycles>12</meta:editing-cycles>
    <meta:document-statistic meta:table-count="0" meta:image-count="2" meta:object-count="0" meta:page-count="16" meta:paragraph-count="297" meta:word-count="3791" meta:character-count="25868" meta:non-whitespace-character-count="22403"/>
  </office:meta>
</office:document-meta>
</file>